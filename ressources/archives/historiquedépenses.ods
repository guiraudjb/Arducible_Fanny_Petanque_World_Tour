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Dépenses J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ement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string" calcext:value-type="string">
            <text:p>vis express</text:p>
          </table:table-cell>
          <table:table-cell office:value-type="float" office:value="36.28" calcext:value-type="float">
            <text:p>36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vis express</text:p>
          </table:table-cell>
          <table:table-cell office:value-type="float" office:value="50.21" calcext:value-type="float">
            <text:p>50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1316.89" calcext:value-type="float">
            <text:p>1316,89</text:p>
          </table:table-cell>
          <table:table-cell/>
          <table:table-cell office:value-type="string" calcext:value-type="string">
            <text:p>Box Android</text:p>
          </table:table-cell>
          <table:table-cell office:value-type="float" office:value="118.69" calcext:value-type="float">
            <text:p>118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les souples</text:p>
          </table:table-cell>
          <table:table-cell office:value-type="float" office:value="688.97" calcext:value-type="float">
            <text:p>688,97</text:p>
          </table:table-cell>
          <table:table-cell/>
          <table:table-cell office:value-type="string" calcext:value-type="string">
            <text:p>câblage</text:p>
          </table:table-cell>
          <table:table-cell table:formula="of:=41.88+44.64" office:value-type="float" office:value="86.52" calcext:value-type="float">
            <text:p>86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tblocs</text:p>
          </table:table-cell>
          <table:table-cell office:value-type="float" office:value="82.69" calcext:value-type="float">
            <text:p>82,69</text:p>
          </table:table-cell>
          <table:table-cell/>
          <table:table-cell office:value-type="string" calcext:value-type="string">
            <text:p>Electroniqu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ttes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onsomable imp 3d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chats</text:p>
          </table:table-cell>
          <table:table-cell table:formula="of:=SUM([.B2:.B7])" office:value-type="float" office:value="5066.55" calcext:value-type="float">
            <text:p>5066,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P</text:p>
          </table:table-cell>
          <table:table-cell table:formula="of:=[.B1]-[.B8]" office:value-type="float" office:value="933.45" calcext:value-type="float">
            <text:p>933,45</text:p>
          </table:table-cell>
          <table:table-cell table:number-columns-repeated="2"/>
          <table:table-cell table:formula="of:=SUM([.E2:.E9])" office:value-type="float" office:value="441.7" calcext:value-type="float">
            <text:p>441,7</text:p>
          </table:table-cell>
          <table:table-cell/>
          <table:table-cell office:value-type="float" office:value="2900" calcext:value-type="float">
            <text:p>2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6:03:15.039816402</meta:creation-date>
    <dc:date>2025-03-15T11:39:33.120344945</dc:date>
    <meta:editing-duration>PT1H12M7S</meta:editing-duration>
    <meta:editing-cycles>4</meta:editing-cycles>
    <meta:generator>LibreOffice/7.4.7.2$Linux_X86_64 LibreOffice_project/40$Build-2</meta:generator>
    <meta:document-statistic meta:table-count="1" meta:cell-count="32" meta:object-count="0"/>
  </office:meta>
</office:document-meta>
</file>